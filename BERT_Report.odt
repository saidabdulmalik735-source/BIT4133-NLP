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fo:margin-left="0.0014in" fo:margin-top="0in" fo:margin-bottom="0in" table:align="left" style:writing-mode="page"/>
    </style:style>
    <style:style style:name="Table1.A" style:family="table-column">
      <style:table-column-properties style:column-width="1.9438in"/>
    </style:style>
    <style:style style:name="Table1.B" style:family="table-column">
      <style:table-column-properties style:column-width="1.5285in"/>
    </style:style>
    <style:style style:name="Table1.C" style:family="table-column">
      <style:table-column-properties style:column-width="1.5271in"/>
    </style:style>
    <style:style style:name="Table1.D" style:family="table-column">
      <style:table-column-properties style:column-width="1.5in"/>
    </style:style>
    <style:style style:name="Table1.1" style:family="table-row">
      <style:table-row-properties fo:keep-together="auto"/>
    </style:style>
    <style:style style:name="Table1.A1" style:family="table-cell">
      <style:table-cell-properties fo:background-color="#1f3864" fo:padding-left="0.0833in" fo:padding-right="0.0833in" fo:padding-top="0.0694in" fo:padding-bottom="0.0694in" fo:border="0.25pt solid #cccccc">
        <style:background-image/>
      </style:table-cell-properties>
    </style:style>
    <style:style style:name="Table1.A2" style:family="table-cell">
      <style:table-cell-properties fo:background-color="#f2f6fa" fo:padding-left="0.0833in" fo:padding-right="0.0833in" fo:padding-top="0.0694in" fo:padding-bottom="0.0694in" fo:border="0.25pt solid #cccccc">
        <style:background-image/>
      </style:table-cell-properties>
    </style:style>
    <style:style style:name="Table2" style:family="table">
      <style:table-properties style:width="6.5in" fo:margin-left="0.0035in" fo:margin-top="0in" fo:margin-bottom="0in" table:align="left" style:writing-mode="page"/>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background-color="#f5f5f5" fo:padding-left="0.1389in" fo:padding-right="0.1389in" fo:padding-top="0.1111in" fo:padding-bottom="0.1111in" fo:border="0.5pt solid #d0d0d0">
        <style:background-image/>
      </style:table-cell-properties>
    </style:style>
    <style:style style:name="Table3" style:family="table">
      <style:table-properties style:width="6.5in" fo:margin-left="0.0035in" fo:margin-top="0in" fo:margin-bottom="0in" table:align="left" style:writing-mode="page"/>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f5f5f5" fo:padding-left="0.1389in" fo:padding-right="0.1389in" fo:padding-top="0.1111in" fo:padding-bottom="0.1111in" fo:border="0.5pt solid #d0d0d0">
        <style:background-image/>
      </style:table-cell-properties>
    </style:style>
    <style:style style:name="Table4" style:family="table">
      <style:table-properties style:width="6.5in" fo:margin-left="0.0035in" fo:margin-top="0in" fo:margin-bottom="0in" table:align="left" style:writing-mode="page"/>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fo:background-color="#f5f5f5" fo:padding-left="0.1389in" fo:padding-right="0.1389in" fo:padding-top="0.1111in" fo:padding-bottom="0.1111in" fo:border="0.5pt solid #d0d0d0">
        <style:background-image/>
      </style:table-cell-properties>
    </style:style>
    <style:style style:name="P1" style:family="paragraph" style:parent-style-name="Heading_20_1">
      <style:paragraph-properties fo:margin-top="0in" fo:margin-bottom="0.139in" style:contextual-spacing="false" fo:break-before="page"/>
    </style:style>
    <style:style style:name="P2" style:family="paragraph" style:parent-style-name="List_20_Paragraph" style:list-style-name="WWNum2">
      <style:paragraph-properties fo:margin-top="0in" fo:margin-bottom="0.0555in" style:contextual-spacing="false"/>
    </style:style>
    <style:style style:name="P3" style:family="paragraph" style:parent-style-name="List_20_Paragraph" style:list-style-name="WWNum3">
      <style:paragraph-properties fo:margin-top="0in" fo:margin-bottom="0.0555in" style:contextual-spacing="false"/>
    </style:style>
    <style:style style:name="P4" style:family="paragraph" style:parent-style-name="Standard">
      <style:paragraph-properties fo:margin-top="0in" fo:margin-bottom="0.0555in" style:contextual-spacing="false" fo:text-align="center" style:justify-single-word="false"/>
    </style:style>
    <style:style style:name="P5" style:family="paragraph" style:parent-style-name="Standard">
      <style:paragraph-properties fo:margin-top="0.5555in" fo:margin-bottom="0in" style:contextual-spacing="false"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margin-top="0in" fo:margin-bottom="0.111in" style:contextual-spacing="false" fo:line-height="0.1917in"/>
    </style:style>
    <style:style style:name="P8" style:family="paragraph" style:parent-style-name="Standard">
      <style:paragraph-properties fo:margin-top="0in" fo:margin-bottom="0.111in" style:contextual-spacing="false"/>
    </style:style>
    <style:style style:name="P9" style:family="paragraph" style:parent-style-name="Standard">
      <style:paragraph-properties fo:margin-top="0in" fo:margin-bottom="0in" style:contextual-spacing="false" fo:line-height="0.1835in"/>
    </style:style>
    <style:style style:name="P10" style:family="paragraph" style:parent-style-name="Standard">
      <style:paragraph-properties fo:margin-top="0in" fo:margin-bottom="0.0972in" style:contextual-spacing="false"/>
    </style:style>
    <style:style style:name="P11" style:family="paragraph" style:parent-style-name="Standard">
      <style:paragraph-properties fo:padding-left="0in" fo:padding-right="0in" fo:padding-top="0in" fo:padding-bottom="0.0555in" fo:border-left="none" fo:border-right="none" fo:border-top="none" fo:border-bottom="0.51pt solid #cccccc">
        <style:tab-stops>
          <style:tab-stop style:position="6.2681in" style:type="right"/>
        </style:tab-stops>
      </style:paragraph-properties>
    </style:style>
    <style:style style:name="P12" style:family="paragraph" style:parent-style-name="Title">
      <style:paragraph-properties fo:margin-top="1.111in" fo:margin-bottom="0.0555in" style:contextual-spacing="false"/>
    </style:style>
    <style:style style:name="T1" style:family="text">
      <style:text-properties fo:color="#444444" loext:opacity="100%" fo:font-size="11pt" style:font-size-asian="11pt" style:font-size-complex="11pt"/>
    </style:style>
    <style:style style:name="T2" style:family="text">
      <style:text-properties fo:color="#777777" loext:opacity="100%" fo:font-size="10pt" fo:font-style="italic" style:font-size-asian="10pt" style:font-style-asian="italic" style:font-size-complex="10pt" style:font-style-complex="italic"/>
    </style:style>
    <style:style style:name="T3" style:family="text">
      <style:text-properties style:font-name="Arial" fo:font-size="11pt" style:font-name-asian="Arial2" style:font-size-asian="11pt" style:font-name-complex="Arial2" style:font-size-complex="11pt"/>
    </style:style>
    <style:style style:name="T4" style:family="text">
      <style:text-properties style:font-name="Arial" fo:font-size="10pt" style:font-name-asian="Arial2" style:font-size-asian="10pt" style:font-name-complex="Arial2" style:font-size-complex="10pt"/>
    </style:style>
    <style:style style:name="T5"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6" style:family="text">
      <style:text-properties style:font-name="Consolas" fo:font-size="9.5pt" style:font-name-asian="Consolas1" style:font-size-asian="9.5pt" style:font-name-complex="Consolas1" style:font-size-complex="9.5pt"/>
    </style:style>
    <style:style style:name="T7" style:family="text">
      <style:text-properties fo:color="#888888" loext:opacity="100%" style:font-name="Arial" fo:font-size="9pt" style:font-name-asian="Arial2" style:font-size-asian="9pt" style:font-name-complex="Arial2"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ERT</text:p>
      <text:p text:style-name="Subtitle">Bidirectional Encoder Representations from Transformers</text:p>
      <text:p text:style-name="P4"><text:span text:style-name="T1">A Report on Architecture, Working Principle, and Applications</text:span></text:p>
      <text:p text:style-name="P5"><text:span text:style-name="T2">Transformer-Based Language Models</text:span></text:p>
      <text:p text:style-name="Standard"/>
      <text:h text:style-name="P1" text:outline-level="1">1. Introduction</text:h>
      <text:p text:style-name="P7"><text:span text:style-name="T3">Bidirectional Encoder Representations from Transformers, known as BERT, is a language representation model introduced by researchers at Google AI Language in 2018. BERT marked a turning point in natural language processing (NLP) by demonstrating that a single pretrained model, when fine-tuned with minimal task-specific modification, could achieve state-of-the-art results across a wide range of language understanding tasks. Unlike earlier language models that processed text strictly left-to-right or combined two separate left-to-right and right-to-left models, BERT was the first to pretrain deep bidirectional representations from unlabeled text, allowing every word to be understood using both its preceding and following context simultaneously.</text:span></text:p>
      <text:p text:style-name="P7"><text:span text:style-name="T3">This report examines BERT's architecture, the mechanics behind how it learns and generates contextual representations, its key strengths and limitations, several real-world applications, and a working Python implementation that demonstrates the model in practice.</text:span></text:p>
      <text:h text:style-name="Heading_20_1" text:outline-level="1">2. Architecture Overview</text:h>
      <text:p text:style-name="P7"><text:span text:style-name="T3">BERT is built entirely on the encoder portion of the Transformer architecture originally proposed by Vaswani et al. in “Attention Is All You Need” (2017). It discards the decoder stack used in sequence-to-sequence Transformers and instead stacks multiple Transformer encoder layers to build deep, bidirectional contextual representations of text.</text:span></text:p>
      <text:h text:style-name="Heading_20_2" text:outline-level="2">2.1 Core Components</text:h>
      <text:list xml:id="list1243643949" text:style-name="WWNum2">
        <text:list-item text:start-value="1">
          <text:p text:style-name="P2"><text:span text:style-name="T3">Input Embeddings: Each input token is represented as the sum of three embeddings — token embeddings (from a WordPiece vocabulary of about 30,000 subword units), segment embeddings (distinguishing sentence A from sentence B in paired inputs), and position embeddings (encoding word order, since the model has no inherent sense of sequence).</text:span></text:p>
        </text:list-item>
        <text:list-item>
          <text:p text:style-name="P2"><text:span text:style-name="T3">Multi-Head Self-Attention: Each encoder layer applies self-attention across all tokens in the input simultaneously, allowing every token to attend to every other token regardless of position. Multiple attention heads allow the model to capture different types of relationships in parallel, such as syntactic dependencies and semantic associations.</text:span></text:p>
        </text:list-item>
        <text:list-item>
          <text:p text:style-name="P2"><text:span text:style-name="T3">Feed-Forward Networks: Following the attention sub-layer, each encoder layer applies a position-wise fully connected feed-forward network with a non-linear activation function (GELU).</text:span></text:p>
        </text:list-item>
        <text:list-item>
          <text:p text:style-name="P2"><text:span text:style-name="T3">Residual Connections and Layer Normalization: Each sub-layer is wrapped with a residual connection followed by layer normalization, stabilizing training and allowing gradients to flow through very deep stacks of layers.</text:span></text:p>
        </text:list-item>
      </text:list>
      <text:h text:style-name="Heading_20_2" text:outline-level="2">2.2 Model Sizes</text:h>
      <text:p text:style-name="P7"><text:span text:style-name="T3">Google released two primary configurations of BER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Model</text:span></text:p>
          </table:table-cell>
          <table:table-cell table:style-name="Table1.A1" office:value-type="string">
            <text:p text:style-name="P6"><text:span text:style-name="T5">Layers</text:span></text:p>
          </table:table-cell>
          <table:table-cell table:style-name="Table1.A1" office:value-type="string">
            <text:p text:style-name="P6"><text:span text:style-name="T5">Hidden Size</text:span></text:p>
          </table:table-cell>
          <table:table-cell table:style-name="Table1.A1" office:value-type="string">
            <text:p text:style-name="P6"><text:span text:style-name="T5">Attention Heads</text:span></text:p>
          </table:table-cell>
        </table:table-row>
        <table:table-row table:style-name="Table1.1">
          <table:table-cell table:style-name="Table1.A2" office:value-type="string">
            <text:p text:style-name="P6"><text:span text:style-name="T4">BERT-Base</text:span></text:p>
          </table:table-cell>
          <table:table-cell table:style-name="Table1.A2" office:value-type="string">
            <text:p text:style-name="P6"><text:span text:style-name="T4">12</text:span></text:p>
          </table:table-cell>
          <table:table-cell table:style-name="Table1.A2" office:value-type="string">
            <text:p text:style-name="P6"><text:span text:style-name="T4">768</text:span></text:p>
          </table:table-cell>
          <table:table-cell table:style-name="Table1.A2" office:value-type="string">
            <text:p text:style-name="P6"><text:span text:style-name="T4">12</text:span></text:p>
          </table:table-cell>
        </table:table-row>
        <table:table-row table:style-name="Table1.1">
          <table:table-cell table:style-name="Table1.A2" office:value-type="string">
            <text:p text:style-name="P6"><text:span text:style-name="T4">BERT-Large</text:span></text:p>
          </table:table-cell>
          <table:table-cell table:style-name="Table1.A2" office:value-type="string">
            <text:p text:style-name="P6"><text:span text:style-name="T4">24</text:span></text:p>
          </table:table-cell>
          <table:table-cell table:style-name="Table1.A2" office:value-type="string">
            <text:p text:style-name="P6"><text:span text:style-name="T4">1024</text:span></text:p>
          </table:table-cell>
          <table:table-cell table:style-name="Table1.A2" office:value-type="string">
            <text:p text:style-name="P6"><text:span text:style-name="T4">16</text:span></text:p>
          </table:table-cell>
        </table:table-row>
      </table:table>
      <text:p text:style-name="P8"/>
      <text:p text:style-name="P7"><text:soft-page-break/><text:span text:style-name="T3">BERT-Base contains approximately 110 million parameters, while BERT-Large contains approximately 340 million. Both accept a maximum input sequence length of 512 tokens.</text:span></text:p>
      <text:h text:style-name="Heading_20_1" text:outline-level="1">3. Working Principle</text:h>
      <text:p text:style-name="P7"><text:span text:style-name="T3">BERT is trained in two distinct stages: pretraining, where the model learns general-purpose language representations from large amounts of unlabeled text, and fine-tuning, where the pretrained model is adapted to a specific downstream task using labeled data.</text:span></text:p>
      <text:h text:style-name="Heading_20_2" text:outline-level="2">3.1 Pretraining Objectives</text:h>
      <text:p text:style-name="P7"><text:span text:style-name="T3">BERT is pretrained using two self-supervised objectives simultaneously:</text:span></text:p>
      <text:list text:style-name="WWNum3">
        <text:list-item text:start-value="1">
          <text:p text:style-name="P3"><text:span text:style-name="T3">Masked Language Modeling (MLM): Approximately 15% of input tokens are randomly selected, and of these, most are replaced with a special [MASK] token, while a smaller portion are replaced with a random word or left unchanged. The model is then trained to predict the original identity of each masked token using the surrounding context from both directions. This forces the model to build genuinely bidirectional representations, since predicting a masked word may depend on words that appear both before and after it.</text:span></text:p>
        </text:list-item>
        <text:list-item>
          <text:p text:style-name="P3"><text:span text:style-name="T3">Next Sentence Prediction (NSP): The model is given pairs of sentences and trained to predict whether the second sentence actually follows the first in the original text, or is a randomly sampled sentence from elsewhere in the corpus. This objective was intended to help the model learn relationships between sentences, which is useful for tasks like question answering and natural language inference.</text:span></text:p>
        </text:list-item>
      </text:list>
      <text:p text:style-name="P7"><text:span text:style-name="T3">BERT was pretrained on a combination of the BooksCorpus (about 800 million words) and English Wikipedia (about 2,500 million words), giving it broad general-domain language knowledge before any task-specific training begins.</text:span></text:p>
      <text:h text:style-name="Heading_20_2" text:outline-level="2">3.2 Fine-Tuning</text:h>
      <text:p text:style-name="P7"><text:span text:style-name="T3">Once pretrained, BERT can be adapted to a specific task by adding a small task-specific output layer on top of the pretrained encoder and continuing training on a labeled dataset for that task. Because the bulk of the network is already pretrained, fine-tuning typically requires only a few epochs and a comparatively small labeled dataset. The same underlying architecture supports very different tasks simply by changing how the final hidden states are used:</text:span></text:p>
      <text:list text:continue-list="list1243643949" text:style-name="WWNum2">
        <text:list-item>
          <text:p text:style-name="P2"><text:span text:style-name="T3">Classification tasks (e.g., sentiment analysis): the hidden state of the special [CLS] token, which is prepended to every input, is passed through a classification layer.</text:span></text:p>
        </text:list-item>
        <text:list-item>
          <text:p text:style-name="P2"><text:span text:style-name="T3">Token-level tasks (e.g., named entity recognition): the hidden state of each individual token is passed through a token-level classification layer.</text:span></text:p>
        </text:list-item>
        <text:list-item>
          <text:p text:style-name="P2"><text:span text:style-name="T3">Span-based tasks (e.g., question answering): two output layers predict the start and end positions of the answer span within the input passage.</text:span></text:p>
        </text:list-item>
      </text:list>
      <text:h text:style-name="Heading_20_2" text:outline-level="2">3.3 Special Tokens</text:h>
      <text:p text:style-name="P7"><text:span text:style-name="T3">BERT uses several reserved tokens to structure its input: [CLS] marks the beginning of the input and is used as an aggregate sequence representation for classification; [SEP] separates two sentences or marks the end of a single sentence; and [MASK] is used only during pretraining to indicate a token the model must predict.</text:span></text:p>
      <text:h text:style-name="Heading_20_1" text:outline-level="1"><text:soft-page-break/>4. Advantages</text:h>
      <text:list text:continue-numbering="true" text:style-name="WWNum2">
        <text:list-item>
          <text:p text:style-name="P2"><text:span text:style-name="T3">True bidirectional context: Because BERT conditions on both left and right context simultaneously at every layer, it captures nuances in meaning that unidirectional models miss, such as resolving ambiguous words based on words that appear later in a sentence.</text:span></text:p>
        </text:list-item>
        <text:list-item>
          <text:p text:style-name="P2"><text:span text:style-name="T3">Strong transfer learning: A single pretrained model can be fine-tuned for many different downstream tasks with relatively small amounts of labeled data and computation, drastically reducing the cost of building task-specific NLP systems.</text:span></text:p>
        </text:list-item>
        <text:list-item>
          <text:p text:style-name="P2"><text:span text:style-name="T3">State-of-the-art performance at release: BERT achieved new state-of-the-art results on eleven NLP benchmarks at the time of its publication, including the GLUE benchmark suite and the SQuAD question-answering dataset.</text:span></text:p>
        </text:list-item>
        <text:list-item>
          <text:p text:style-name="P2"><text:span text:style-name="T3">Architectural flexibility: The same pretrained backbone supports sentence classification, token classification, sentence-pair tasks, and span extraction with only minor changes to the output layer.</text:span></text:p>
        </text:list-item>
        <text:list-item>
          <text:p text:style-name="P2"><text:span text:style-name="T3">Rich contextual word representations: Unlike static word embeddings (e.g., Word2Vec or GloVe), BERT produces a different representation for the same word depending on its surrounding context, correctly distinguishing, for example, “bank” in a financial sentence from “bank” in a river-related sentence.</text:span></text:p>
        </text:list-item>
        <text:list-item>
          <text:p text:style-name="P2"><text:span text:style-name="T3">Strong ecosystem and reproducibility: BERT's popularity led to widely available pretrained checkpoints, extensive documentation, and mature libraries (notably Hugging Face Transformers), making it straightforward to adopt in both research and production.</text:span></text:p>
        </text:list-item>
      </text:list>
      <text:h text:style-name="Heading_20_1" text:outline-level="1">5. Limitations</text:h>
      <text:list text:continue-numbering="true" text:style-name="WWNum2">
        <text:list-item>
          <text:p text:style-name="P2"><text:span text:style-name="T3">High computational cost: Pretraining BERT from scratch requires substantial compute resources and large corpora, and even fine-tuning BERT-Large can be demanding on memory-constrained hardware.</text:span></text:p>
        </text:list-item>
        <text:list-item>
          <text:p text:style-name="P2"><text:span text:style-name="T3">Fixed maximum input length: BERT can only process sequences of up to 512 tokens, making it unsuitable for long documents without additional strategies such as chunking or sliding windows.</text:span></text:p>
        </text:list-item>
        <text:list-item>
          <text:p text:style-name="P2"><text:span text:style-name="T3">Pretrain-finetune discrepancy: The [MASK] token used heavily during pretraining never appears during fine-tuning or inference, creating a mismatch between the pretraining and downstream input distributions.</text:span></text:p>
        </text:list-item>
        <text:list-item>
          <text:p text:style-name="P2"><text:span text:style-name="T3">Next Sentence Prediction's questionable value: Later research, including the RoBERTa study, found that the NSP objective contributed little to downstream performance and that removing it while training on more data and for longer often improved results.</text:span></text:p>
        </text:list-item>
        <text:list-item>
          <text:p text:style-name="P2"><text:span text:style-name="T3">Not naturally suited to text generation: Because BERT is a bidirectional encoder rather than an autoregressive decoder, it is not well suited to free-form text generation tasks, where models such as GPT are more appropriate.</text:span></text:p>
        </text:list-item>
        <text:list-item>
          <text:p text:style-name="P2"><text:span text:style-name="T3">Sensitivity to fine-tuning instability: Fine-tuning BERT, particularly BERT-Large, on small datasets can be unstable, sometimes producing degenerate results depending on the random seed and learning rate schedule chosen.</text:span></text:p>
        </text:list-item>
      </text:list>
      <text:h text:style-name="Heading_20_1" text:outline-level="1">6. Real-World Applications</text:h>
      <text:list text:continue-numbering="true" text:style-name="WWNum2">
        <text:list-item>
          <text:p text:style-name="P2"><text:span text:style-name="T3">Search engines: Google has used BERT-based models to better understand the intent behind search queries, particularly for queries involving prepositions and nuanced phrasing where word order materially changes meaning.</text:span></text:p>
        </text:list-item>
        <text:list-item>
          <text:p text:style-name="P2"><text:soft-page-break/><text:span text:style-name="T3">Sentiment and opinion analysis: BERT is widely fine-tuned for classifying customer reviews, social media posts, and survey responses by sentiment or topic in customer experience and market research applications.</text:span></text:p>
        </text:list-item>
        <text:list-item>
          <text:p text:style-name="P2"><text:span text:style-name="T3">Question answering systems: Fine-tuned variants of BERT power extractive question-answering systems that locate the exact span of text in a passage that answers a given question, as demonstrated on the SQuAD benchmark.</text:span></text:p>
        </text:list-item>
        <text:list-item>
          <text:p text:style-name="P2"><text:span text:style-name="T3">Named entity recognition (NER): BERT-based token classifiers are used in legal, medical, and financial document processing to automatically identify names, organizations, dates, and other structured entities within unstructured text.</text:span></text:p>
        </text:list-item>
        <text:list-item>
          <text:p text:style-name="P2"><text:span text:style-name="T3">Chatbots and virtual assistants: BERT and its derivatives are used as components in intent classification and natural language understanding pipelines for conversational AI systems.</text:span></text:p>
        </text:list-item>
        <text:list-item>
          <text:p text:style-name="P2"><text:span text:style-name="T3">Document classification and spam detection: Enterprises use fine-tuned BERT models to automatically route, tag, or filter large volumes of incoming text such as support tickets, emails, and legal filings.</text:span></text:p>
        </text:list-item>
        <text:list-item>
          <text:p text:style-name="P2"><text:span text:style-name="T3">Biomedical and scientific text mining: Domain-adapted variants such as BioBERT and SciBERT apply the same architecture to specialized vocabularies, supporting tasks like extracting relationships between genes, diseases, and drugs from scientific literature.</text:span></text:p>
        </text:list-item>
      </text:list>
      <text:h text:style-name="Heading_20_1" text:outline-level="1">7. Python Implementation Example</text:h>
      <text:p text:style-name="P7"><text:span text:style-name="T3">The following example uses the Hugging Face Transformers library, the most widely used toolkit for working with pretrained Transformer models, to demonstrate two common use cases for BERT: (1) extracting contextual embeddings directly from the pretrained model, and (2) using a fine-tuned BERT model for a downstream task, in this case sentiment classification.</text:span></text:p>
      <text:h text:style-name="Heading_20_2" text:outline-level="2">7.1 Setup</text:h>
      <table:table table:name="Table2" table:style-name="Table2">
        <table:table-column table:style-name="Table2.A"/>
        <table:table-row table:style-name="Table2.1">
          <table:table-cell table:style-name="Table2.A1" office:value-type="string">
            <text:p text:style-name="P9"><text:span text:style-name="T6">pip install transformers torch</text:span></text:p>
          </table:table-cell>
        </table:table-row>
      </table:table>
      <text:p text:style-name="P10"/>
      <text:h text:style-name="Heading_20_2" text:outline-level="2">7.2 Extracting Contextual Embeddings</text:h>
      <table:table table:name="Table3" table:style-name="Table3">
        <table:table-column table:style-name="Table3.A"/>
        <table:table-row table:style-name="Table3.1">
          <table:table-cell table:style-name="Table3.A1" office:value-type="string">
            <text:p text:style-name="P9"><text:span text:style-name="T6">from transformers import BertTokenizer, BertModel</text:span></text:p>
            <text:p text:style-name="P9"><text:span text:style-name="T6">import torch</text:span></text:p>
            <text:p text:style-name="P9"><text:span text:style-name="T6"><text:s/></text:span></text:p>
            <text:p text:style-name="P9"><text:span text:style-name="T6"># Load pretrained BERT tokenizer and model</text:span></text:p>
            <text:p text:style-name="P9"><text:span text:style-name="T6">tokenizer = BertTokenizer.from_pretrained('bert-base-uncased')</text:span></text:p>
            <text:p text:style-name="P9"><text:span text:style-name="T6">model = BertModel.from_pretrained('bert-base-uncased')</text:span></text:p>
            <text:p text:style-name="P9"><text:span text:style-name="T6">model.eval()</text:span></text:p>
            <text:p text:style-name="P9"><text:span text:style-name="T6"><text:s/></text:span></text:p>
            <text:p text:style-name="P9"><text:span text:style-name="T6"># Example sentences showing context-dependent meaning</text:span></text:p>
            <text:p text:style-name="P9"><text:span text:style-name="T6">sentence_1 = "He deposited cash at the bank."</text:span></text:p>
            <text:p text:style-name="P9"><text:span text:style-name="T6">sentence_2 = "They sat by the river bank."</text:span></text:p>
            <text:p text:style-name="P9"><text:span text:style-name="T6"><text:s/></text:span></text:p>
            <text:p text:style-name="P9"><text:span text:style-name="T6">def get_embedding(sentence, target_word):</text:span></text:p>
            <text:p text:style-name="P9"><text:span text:style-name="T6"><text:s text:c="4"/>inputs = tokenizer(sentence, return_tensors='pt')</text:span></text:p>
            <text:p text:style-name="P9"><text:span text:style-name="T6"><text:s text:c="4"/>with torch.no_grad():</text:span></text:p>
            <text:p text:style-name="P9"><text:soft-page-break/><text:span text:style-name="T6"><text:s text:c="8"/>outputs = model(**inputs)</text:span></text:p>
            <text:p text:style-name="P9"><text:span text:style-name="T6"><text:s text:c="4"/># Last hidden state: [batch, seq_len, hidden_size]</text:span></text:p>
            <text:p text:style-name="P9"><text:span text:style-name="T6"><text:s text:c="4"/>hidden_states = outputs.last_hidden_state</text:span></text:p>
            <text:p text:style-name="P9"><text:span text:style-name="T6"><text:s/></text:span></text:p>
            <text:p text:style-name="P9"><text:span text:style-name="T6"><text:s text:c="4"/>tokens = tokenizer.convert_ids_to_tokens(inputs['input_ids'][0])</text:span></text:p>
            <text:p text:style-name="P9"><text:span text:style-name="T6"><text:s text:c="4"/>idx = tokens.index(target_word)</text:span></text:p>
            <text:p text:style-name="P9"><text:span text:style-name="T6"><text:s text:c="4"/>return hidden_states[0, idx]</text:span></text:p>
            <text:p text:style-name="P9"><text:span text:style-name="T6"><text:s/></text:span></text:p>
            <text:p text:style-name="P9"><text:span text:style-name="T6">embedding_1 = get_embedding(sentence_1, 'bank')</text:span></text:p>
            <text:p text:style-name="P9"><text:span text:style-name="T6">embedding_2 = get_embedding(sentence_2, 'bank')</text:span></text:p>
            <text:p text:style-name="P9"><text:span text:style-name="T6"><text:s/></text:span></text:p>
            <text:p text:style-name="P9"><text:span text:style-name="T6"># Cosine similarity shows the two 'bank' embeddings differ</text:span></text:p>
            <text:p text:style-name="P9"><text:span text:style-name="T6">cos_sim = torch.nn.functional.cosine_similarity(</text:span></text:p>
            <text:p text:style-name="P9"><text:span text:style-name="T6"><text:s text:c="4"/>embedding_1.unsqueeze(0), embedding_2.unsqueeze(0)</text:span></text:p>
            <text:p text:style-name="P9"><text:span text:style-name="T6">)</text:span></text:p>
            <text:p text:style-name="P9"><text:span text:style-name="T6">print(f'Cosine similarity between the two "bank" usages: {cos_sim.item():.4f}')</text:span></text:p>
          </table:table-cell>
        </table:table-row>
      </table:table>
      <text:p text:style-name="P10"/>
      <text:p text:style-name="P7"><text:span text:style-name="T3">This example tokenizes two sentences that each contain the word “bank” in a different sense, then extracts BERT's contextual embedding for that specific token from the final hidden layer. Because BERT generates context-dependent representations rather than fixed word vectors, the resulting cosine similarity between the two embeddings is noticeably lower than it would be for two truly identical usages of the word, demonstrating that BERT distinguishes word sense from surrounding context.</text:span></text:p>
      <text:h text:style-name="Heading_20_2" text:outline-level="2">7.3 Fine-Tuned Sentiment Classification</text:h>
      <table:table table:name="Table4" table:style-name="Table4">
        <table:table-column table:style-name="Table4.A"/>
        <table:table-row table:style-name="Table4.1">
          <table:table-cell table:style-name="Table4.A1" office:value-type="string">
            <text:p text:style-name="P9"><text:span text:style-name="T6">from transformers import pipeline</text:span></text:p>
            <text:p text:style-name="P9"><text:span text:style-name="T6"><text:s/></text:span></text:p>
            <text:p text:style-name="P9"><text:span text:style-name="T6"># Load a BERT model already fine-tuned for sentiment classification</text:span></text:p>
            <text:p text:style-name="P9"><text:span text:style-name="T6">classifier = pipeline(</text:span></text:p>
            <text:p text:style-name="P9"><text:span text:style-name="T6"><text:s text:c="4"/>'sentiment-analysis',</text:span></text:p>
            <text:p text:style-name="P9"><text:span text:style-name="T6"><text:s text:c="4"/>model='nlptown/bert-base-multilingual-uncased-sentiment'</text:span></text:p>
            <text:p text:style-name="P9"><text:span text:style-name="T6">)</text:span></text:p>
            <text:p text:style-name="P9"><text:span text:style-name="T6"><text:s/></text:span></text:p>
            <text:p text:style-name="P9"><text:span text:style-name="T6">reviews = [</text:span></text:p>
            <text:p text:style-name="P9"><text:span text:style-name="T6"><text:s text:c="4"/>'The product exceeded my expectations, highly recommended!',</text:span></text:p>
            <text:p text:style-name="P9"><text:span text:style-name="T6"><text:s text:c="4"/>'Terrible experience, the item arrived broken and support was unhelpful.',</text:span></text:p>
            <text:p text:style-name="P9"><text:span text:style-name="T6"><text:s text:c="4"/>'It works fine, nothing special but does the job.'</text:span></text:p>
            <text:p text:style-name="P9"><text:span text:style-name="T6">]</text:span></text:p>
            <text:p text:style-name="P9"><text:span text:style-name="T6"><text:s/></text:span></text:p>
            <text:p text:style-name="P9"><text:span text:style-name="T6">results = classifier(reviews)</text:span></text:p>
            <text:p text:style-name="P9"><text:span text:style-name="T6"><text:s/></text:span></text:p>
            <text:p text:style-name="P9"><text:span text:style-name="T6">for review, result in zip(reviews, results):</text:span></text:p>
            <text:p text:style-name="P9"><text:span text:style-name="T6"><text:s text:c="4"/>print(f"Review: {review}")</text:span></text:p>
            <text:p text:style-name="P9"><text:span text:style-name="T6"><text:s text:c="4"/>print(f" <text:s/>-&gt; Predicted: {result['label']} (confidence: {result['score']:.3f})\n")</text:span></text:p>
          </table:table-cell>
        </table:table-row>
      </table:table>
      <text:p text:style-name="P10"/>
      <text:p text:style-name="P7"><text:soft-page-break/><text:span text:style-name="T3">This second example uses a BERT checkpoint that has already been fine-tuned for sentiment classification, exposed through Hugging Face's high-level pipeline() API. The pipeline takes care of tokenization, running the forward pass through BERT, and converting the output logits into human-readable sentiment labels with associated confidence scores, illustrating how little code is required to put a fine-tuned BERT model into production once a suitable pretrained checkpoint is available.</text:span></text:p>
      <text:h text:style-name="Heading_20_1" text:outline-level="1">8. Conclusion</text:h>
      <text:p text:style-name="P7"><text:span text:style-name="T3">BERT's introduction of deep bidirectional pretraining fundamentally changed how NLP systems are built, shifting the field toward a “pretrain then fine-tune” paradigm that remains dominant today. While newer models have since addressed several of BERT's limitations, such as its pretraining objective and fixed input length, BERT remains a foundational architecture and a practical, widely deployed solution for a broad range of natural language understanding tasks across industry and research.</text:span></text:p>
      <text:h text:style-name="Heading_20_1" text:outline-level="1">References</text:h>
      <text:p text:style-name="P7"><text:span text:style-name="T3">Devlin, J., Chang, M., Lee, K., &amp; Toutanova, K. (2019). BERT: Pre-training of Deep Bidirectional Transformers for Language Understanding. Proceedings of NAACL-HLT 2019.</text:span></text:p>
      <text:p text:style-name="P7"><text:span text:style-name="T3">Vaswani, A., Shazeer, N., Parmar, N., et al. (2017). Attention Is All You Need. Advances in Neural Information Processing Systems (NeurIPS) 30.</text:span></text:p>
      <text:p text:style-name="P7"><text:span text:style-name="T3">Hugging Face. Transformers Documentation. https://huggingface.co/docs/transform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paragraph-properties fo:margin-top="0.1665in" fo:margin-bottom="0.0555in" style:contextual-spacing="false" fo:text-align="center" style:justify-single-word="false"/>
      <style:text-properties fo:color="#1f3864" loext:opacity="100%" style:font-name="Arial1" fo:font-family="Arial" style:font-family-generic="swiss" style:font-pitch="variable" fo:font-size="22pt" fo:font-weight="bold" style:font-name-asian="Arial2" style:font-family-asian="Arial" style:font-family-generic-asian="system" style:font-pitch-asian="variable" style:font-size-asian="22pt" style:font-weight-asian="bold" style:font-name-complex="Arial2" style:font-family-complex="Arial" style:font-family-generic-complex="system" style:font-pitch-complex="variable" style:font-size-complex="22pt" style:font-weight-complex="bold"/>
    </style:style>
    <style:style style:name="Heading_20_1" style:display-name="Heading 1" style:family="paragraph" style:parent-style-name="Heading" style:default-outline-level="1" style:list-style-name="" style:class="text">
      <style:paragraph-properties fo:margin-top="0.25in" fo:margin-bottom="0.139in" style:contextual-spacing="false"/>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807in" fo:margin-bottom="0.111in" style:contextual-spacing="false"/>
      <style:text-properties fo:color="#2e5395"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Heading" style:class="chapter">
      <style:paragraph-properties fo:margin-top="0.1665in" fo:margin-bottom="0.278in" style:contextual-spacing="false" fo:text-align="center" style:justify-single-word="false"/>
      <style:text-properties fo:color="#595959" loext:opacity="100%" style:font-name="Arial1" fo:font-family="Arial" style:font-family-generic="swiss" style:font-pitch="variable" fo:font-size="13pt" style:font-name-asian="Arial2" style:font-family-asian="Arial" style:font-family-generic-asian="system" style:font-pitch-asian="variable" style:font-size-asian="13pt" style:font-name-complex="Arial2" style:font-family-complex="Arial"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color="#888888" loext:opacity="100%" style:font-name="Arial" fo:font-size="9pt" style:font-name-asian="Arial2" style:font-size-asian="9pt" style:font-name-complex="Arial2" style:font-size-complex="9pt"/>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7</text:page-number><text:span text:style-name="MT1"><text:s/>of </text:span><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6-28T14:44:59.983000000</meta:creation-date>
    <dc:date>2026-06-28T17:51:51.952918884</dc:date>
    <meta:editing-duration>PT1M9S</meta:editing-duration>
    <meta:document-statistic meta:table-count="4" meta:image-count="0" meta:object-count="0" meta:page-count="7" meta:paragraph-count="132" meta:word-count="1957" meta:character-count="14276" meta:non-whitespace-character-count="12389"/>
    <meta:generator>LibreOffice/24.2.7.2$Linux_X86_64 LibreOffice_project/420$Build-2</meta:generator>
  </office:meta>
</office:document-meta>
</file>