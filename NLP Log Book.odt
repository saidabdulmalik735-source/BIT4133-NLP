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B00000233FB3C08B6.png" manifest:media-type="image/png"/>
  <manifest:file-entry manifest:full-path="Pictures/100000000000034B00000124F4C2BFBC.png" manifest:media-type="image/png"/>
  <manifest:file-entry manifest:full-path="Pictures/100000000000030E0000023AF1645DAF.png" manifest:media-type="image/png"/>
  <manifest:file-entry manifest:full-path="Pictures/1000000000000384000001B614B39AD8.png" manifest:media-type="image/png"/>
  <manifest:file-entry manifest:full-path="Pictures/1000000000000387000002379E3810AB.png" manifest:media-type="image/png"/>
  <manifest:file-entry manifest:full-path="Pictures/100000000000009800000094652348C8.jpg" manifest:media-type="image/jpeg"/>
  <manifest:file-entry manifest:full-path="Pictures/100000000000030C000001D5E7F2DD6B.png" manifest:media-type="image/png"/>
  <manifest:file-entry manifest:full-path="Pictures/1000000000000348000001EBE4B12982.png" manifest:media-type="image/png"/>
  <manifest:file-entry manifest:full-path="Pictures/10000000000003460000021EB1C7F3E8.png" manifest:media-type="image/png"/>
  <manifest:file-entry manifest:full-path="Pictures/10000000000004930000024E80073222.png" manifest:media-type="image/png"/>
  <manifest:file-entry manifest:full-path="Pictures/1000000000000286000000CD79E024E7.png" manifest:media-type="image/png"/>
  <manifest:file-entry manifest:full-path="Pictures/10000000000004F90000017522093365.png" manifest:media-type="image/png"/>
  <manifest:file-entry manifest:full-path="Pictures/10000000000003F2000001F0FF3D44E5.png" manifest:media-type="image/png"/>
  <manifest:file-entry manifest:full-path="Pictures/100000000000032400000247C2D0DEE5.png" manifest:media-type="image/png"/>
  <manifest:file-entry manifest:full-path="Pictures/10000000000003DC00000221C3774D4B.png" manifest:media-type="image/png"/>
  <manifest:file-entry manifest:full-path="Pictures/10000000000002DF000002B5C9FECB1A.png" manifest:media-type="image/png"/>
  <manifest:file-entry manifest:full-path="Pictures/1000000000000274000002AD2180E61D.png" manifest:media-type="image/png"/>
  <manifest:file-entry manifest:full-path="Pictures/1000000000000335000001DDAFBBB7F6.png" manifest:media-type="image/png"/>
  <manifest:file-entry manifest:full-path="Pictures/10000000000003D900000233A4EFC0A4.png" manifest:media-type="image/png"/>
  <manifest:file-entry manifest:full-path="Pictures/1000000000000317000001045E852A15.png" manifest:media-type="image/png"/>
  <manifest:file-entry manifest:full-path="Pictures/10000000000003A6000002253D22021E.png" manifest:media-type="image/png"/>
  <manifest:file-entry manifest:full-path="Pictures/1000000000000402000002098A3E33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Standard" style:list-style-name="">
      <style:paragraph-properties fo:margin-top="0in" fo:margin-bottom="0.1945in" style:contextual-spacing="false" fo:line-height="100%"/>
      <style:text-properties officeooo:paragraph-rsid="000775df"/>
    </style:style>
    <style:style style:name="P5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775df"/>
    </style:style>
    <style:style style:name="P6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47a23"/>
    </style:style>
    <style:style style:name="P7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775df"/>
    </style:style>
    <style:style style:name="P8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9688a"/>
    </style:style>
    <style:style style:name="P9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9688a"/>
    </style:style>
    <style:style style:name="P10" style:family="paragraph" style:parent-style-name="Standard">
      <style:paragraph-properties fo:margin-top="0.1945in" fo:margin-bottom="0in" style:contextual-spacing="false" fo:line-height="100%"/>
      <style:text-properties officeooo:paragraph-rsid="0009688a"/>
    </style:style>
    <style:style style:name="P11" style:family="paragraph" style:parent-style-name="Standard">
      <style:paragraph-properties fo:margin-top="0.1945in" fo:margin-bottom="0in" style:contextual-spacing="false" fo:line-height="100%" fo:break-before="page"/>
      <style:text-properties officeooo:paragraph-rsid="0009688a"/>
    </style:style>
    <style:style style:name="P12" style:family="paragraph" style:parent-style-name="Standard">
      <style:paragraph-properties fo:margin-top="0.1945in" fo:margin-bottom="0.1945in" style:contextual-spacing="false" fo:line-height="100%"/>
      <style:text-properties officeooo:paragraph-rsid="0009688a"/>
    </style:style>
    <style:style style:name="P13" style:family="paragraph" style:parent-style-name="Standard" style:list-style-name="WWNum8">
      <style:paragraph-properties fo:margin-top="0.1945in" fo:margin-bottom="0in" style:contextual-spacing="false" fo:line-height="100%"/>
      <style:text-properties officeooo:paragraph-rsid="000bc174"/>
    </style:style>
    <style:style style:name="P14" style:family="paragraph" style:parent-style-name="Standard" style:list-style-name="WWNum10">
      <style:paragraph-properties fo:margin-top="0.1945in" fo:margin-bottom="0in" style:contextual-spacing="false" fo:line-height="100%"/>
      <style:text-properties officeooo:paragraph-rsid="000bc174"/>
    </style:style>
    <style:style style:name="P15" style:family="paragraph" style:parent-style-name="Standard" style:list-style-name="WWNum10">
      <style:paragraph-properties fo:margin-top="0in" fo:margin-bottom="0in" style:contextual-spacing="false" fo:line-height="100%"/>
      <style:text-properties officeooo:paragraph-rsid="000bc174"/>
    </style:style>
    <style:style style:name="P16" style:family="paragraph" style:parent-style-name="Standard" style:list-style-name="WWNum10">
      <style:paragraph-properties fo:margin-top="0in" fo:margin-bottom="0.1945in" style:contextual-spacing="false" fo:line-height="100%"/>
      <style:text-properties officeooo:paragraph-rsid="000bc174"/>
    </style:style>
    <style:style style:name="P17" style:family="paragraph" style:parent-style-name="Standard">
      <style:paragraph-properties fo:margin-top="0.1945in" fo:margin-bottom="0.1945in" style:contextual-spacing="false" fo:line-height="100%"/>
      <style:text-properties officeooo:paragraph-rsid="000bc174"/>
    </style:style>
    <style:style style:name="P18" style:family="paragraph" style:parent-style-name="Standard">
      <style:paragraph-properties fo:margin-top="0in" fo:margin-bottom="0.1945in" style:contextual-spacing="false" fo:line-height="100%"/>
      <style:text-properties officeooo:paragraph-rsid="000bc174"/>
    </style:style>
    <style:style style:name="P19" style:family="paragraph" style:parent-style-name="Standard">
      <style:text-properties fo:font-weight="bold" officeooo:paragraph-rsid="000775df" style:font-weight-asian="bold" style:font-weight-complex="bold"/>
    </style:style>
    <style:style style:name="P20" style:family="paragraph" style:parent-style-name="Standard">
      <style:text-properties fo:font-size="16pt" fo:font-weight="bold" officeooo:rsid="00041d29" officeooo:paragraph-rsid="000775df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2pt" fo:font-weight="bold" officeooo:rsid="00041d29" officeooo:paragraph-rsid="000775df" style:font-size-asian="10.5pt" style:font-weight-asian="bold" style:font-size-complex="12pt" style:font-weight-complex="bold"/>
    </style:style>
    <style:style style:name="P22" style:family="paragraph" style:parent-style-name="Standard">
      <style:text-properties officeooo:paragraph-rsid="000775df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0bc174" style:font-name-asian="Times New Roman1" style:font-size-asian="12pt" style:font-name-complex="Times New Roman1" style:font-size-complex="12pt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in" fo:margin-bottom="0in" style:contextual-spacing="false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24pt" fo:font-weight="bold" officeooo:rsid="00041d29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24pt" officeooo:rsid="00041d29" style:letter-kerning="true" style:font-name-asian="Times New Roman1" style:font-size-asian="24pt" style:font-name-complex="Times New Roman1" style:font-size-complex="24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style:letter-kerning="true" style:font-name-asian="Times New Roman1" style:font-size-asian="12pt" style:font-name-complex="Times New Roman1" style:font-size-complex="18pt"/>
    </style:style>
    <style:style style:name="T7" style:family="text">
      <style:text-properties style:font-name="Times New Roman" fo:font-size="18pt" fo:font-weight="normal" officeooo:rsid="00041d29" style:letter-kerning="true" style:font-name-asian="Times New Roman1" style:font-size-asian="12pt" style:font-weight-asian="normal" style:font-name-complex="Times New Roman1" style:font-size-complex="18pt" style:font-weight-complex="normal"/>
    </style:style>
    <style:style style:name="T8" style:family="text">
      <style:text-properties style:font-name="Times New Roman" style:font-name-asian="Times New Roman1" style:font-size-asian="12pt" style:font-name-complex="Times New Roman1"/>
    </style:style>
    <style:style style:name="T9" style:family="text">
      <style:text-properties style:font-name="Times New Roman" fo:font-weight="normal" style:font-name-asian="Times New Roman1" style:font-size-asian="12pt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size-asian="12pt" style:font-weight-asian="bold" style:font-name-complex="Times New Roman1" style:font-weight-complex="bold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e6b0b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041d29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041d29" style:font-name-asian="Times New Roman1" style:font-size-asian="10.5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041d29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0775df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147a23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font-weight="bold" officeooo:rsid="0012c371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officeooo:rsid="00041d29" style:letter-kerning="true" style:font-name-asian="Times New Roman1" style:font-name-complex="Times New Roman1"/>
    </style:style>
    <style:style style:name="T23" style:family="text">
      <style:text-properties style:font-name="Times New Roman" officeooo:rsid="000775df" style:letter-kerning="true" style:font-name-asian="Times New Roman1" style:font-name-complex="Times New Roman1"/>
    </style:style>
    <style:style style:name="T24" style:family="text">
      <style:text-properties style:font-name="Times New Roman" fo:font-size="20pt" officeooo:rsid="00041d29" style:letter-kerning="true" style:font-name-asian="Times New Roman1" style:font-size-asian="20pt" style:font-name-complex="Times New Roman1" style:font-size-complex="2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12pt" fo:font-weight="bold" officeooo:rsid="00041d29" style:font-size-asian="10.5pt" style:font-weight-asian="bold" style:font-size-complex="12pt" style:font-weight-complex="bold"/>
    </style:style>
    <style:style style:name="T27" style:family="text">
      <style:text-properties fo:font-size="12pt" fo:font-weight="normal" officeooo:rsid="00041d29" style:font-size-asian="10.5pt" style:font-weight-asian="normal" style:font-size-complex="12pt" style:font-weight-complex="normal"/>
    </style:style>
    <style:style style:name="T28" style:family="text">
      <style:text-properties officeooo:rsid="000cb4c6"/>
    </style:style>
    <style:style style:name="T29" style:family="text">
      <style:text-properties officeooo:rsid="00147a2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loext:marker-style-name="T1"><draw:frame draw:style-name="fr5" draw:name="Image4" text:anchor-type="char" svg:width="1.5835in" svg:height="1.5417in" draw:z-index="3"><draw:image xlink:href="Pictures/100000000000009800000094652348C8.jpg" xlink:type="simple" xlink:show="embed" xlink:actuate="onLoad" draw:mime-type="image/jpeg"/></draw:frame><text:span text:style-name="T1"/></text:h>
      <text:h text:style-name="P4" text:outline-level="1" loext:marker-style-name="T1"><text:span text:style-name="T1"/></text:h>
      <text:h text:style-name="P4" text:outline-level="1" loext:marker-style-name="T1"><text:span text:style-name="T1"/></text:h>
      <text:h text:style-name="P4" text:outline-level="1" loext:marker-style-name="T1"><text:bookmark-start text:name="__RefHeading___Toc5693_2625077907"/><text:span text:style-name="T1">Logbook</text:span><text:bookmark-end text:name="__RefHeading___Toc5693_2625077907"/></text:h>
      <text:h text:style-name="P5" text:outline-level="2" loext:marker-style-name="T4"><text:bookmark-start text:name="__RefHeading___Toc5695_2625077907"/><text:span text:style-name="T5">BIT4133: Natural Language Processing with Deep Learning</text:span><text:bookmark-end text:name="__RefHeading___Toc5695_2625077907"/></text:h>
      <text:p text:style-name="P20"><text:span text:style-name="T28">S</text:span>TUDENT DETAILS</text:p>
      <text:p text:style-name="P21">NAME : <text:span text:style-name="T25">ABDULMALIK HAMED<text:line-break/></text:span></text:p>
      <text:p text:style-name="P21">ADM NO. : <text:span text:style-name="T25">BSCCS/2024/33590</text:span></text:p>
      <text:p text:style-name="P22"><text:span text:style-name="T26"/></text:p>
      <text:p text:style-name="P22"><text:span text:style-name="T26">COURSE/CLASS : </text:span><text:span text:style-name="T27"><text:s/>COMPUTER SCIENCE JAN 24</text:span></text:p>
      <text:p text:style-name="P22"><text:span text:style-name="T15"/></text:p>
      <text:p text:style-name="P22"><text:span text:style-name="T19">Unit Code: BIT4133</text:span></text:p>
      <text:p text:style-name="P22"><text:span text:style-name="T10"/></text:p>
      <text:p text:style-name="P22"><text:span text:style-name="T10">Unit Name:</text:span><text:span text:style-name="T9"> </text:span><text:span text:style-name="T13">Natural Language Processing with Deep Learning</text:span></text:p>
      <text:p text:style-name="P19"><text:span text:style-name="T11"/></text:p>
      <text:p text:style-name="P19"><text:span text:style-name="T11">Lecturer Name : </text:span><text:span text:style-name="T14">MICHAEL NYORO</text:span></text:p>
      <text:p text:style-name="P19"><text:span text:style-name="T8"/></text:p>
      <text:p text:style-name="P19"><text:span text:style-name="T6">Semester/Academic Year : </text:span><text:span text:style-name="T7">YEAR 4 SEM 2</text:span></text:p>
      <text:p text:style-name="P19"><text:span text:style-name="T7"/></text:p>
      <text:h text:style-name="P5" text:outline-level="1" loext:marker-style-name="T1"><text:bookmark-start text:name="__RefHeading___Toc5697_2625077907"/><text:span text:style-name="T2">Project</text:span><text:span text:style-name="T3"> : </text:span><text:span text:style-name="Strong_20_Emphasis"><text:span text:style-name="T24">Text Classification</text:span></text:span><text:bookmark-end text:name="__RefHeading___Toc5697_2625077907"/></text:h>
      <text:h text:style-name="P6" text:outline-level="1" loext:marker-style-name="T1"><text:span text:style-name="T2">Technologies Used</text:span></text:h>
      <text:h text:style-name="P6" text:outline-level="1" loext:marker-style-name="T1"><text:span text:style-name="T16">Python, NLTK, <text:s/>Scikit-lear</text:span><text:span text:style-name="T18">n,</text:span><text:span text:style-name="T16"> Google Colab, Jupyter Notebook</text:span></text:h>
      <text:h text:style-name="P8" text:outline-level="2" loext:marker-style-name="T4"><text:bookmark-start text:name="__RefHeading___Toc5711_2625077907"/><text:span text:style-name="T4">GitHub Link</text:span><text:bookmark-end text:name="__RefHeading___Toc5711_2625077907"/></text:h>
      <text:p text:style-name="P10" loext:marker-style-name="T11"><text:a xlink:type="simple" xlink:href="https://github.com/saidabdulmalik735-source" text:style-name="Internet_20_link" text:visited-style-name="Visited_20_Internet_20_Link"><text:span text:style-name="T14">https://github.com/saidabdulmalik735-source</text:span></text:a></text:p>
      <text:p text:style-name="P11" loext:marker-style-name="T11"><text:span text:style-name="T1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5693_2625077907" text:style-name="Index_20_Link" text:visited-style-name="Index_20_Link">Logbook<text:tab/>1</text:a></text:p>
          <text:p text:style-name="P2"><text:a xlink:type="simple" xlink:href="#__RefHeading___Toc5695_2625077907" text:style-name="Index_20_Link" text:visited-style-name="Index_20_Link">BIT4133: Natural Language Processing with Deep Learning<text:tab/>1</text:a></text:p>
          <text:p text:style-name="P1"><text:a xlink:type="simple" xlink:href="#__RefHeading___Toc5697_2625077907" text:style-name="Index_20_Link" text:visited-style-name="Index_20_Link">Project : Text Classification<text:tab/>1</text:a></text:p>
          <text:p text:style-name="P1"><text:a xlink:type="simple" xlink:href="#__RefHeading___Toc5699_2625077907" text:style-name="Index_20_Link" text:visited-style-name="Index_20_Link">Technologies Used<text:tab/>1</text:a></text:p>
          <text:p text:style-name="P1"><text:a xlink:type="simple" xlink:href="#__RefHeading___Toc5701_2625077907" text:style-name="Index_20_Link" text:visited-style-name="Index_20_Link"><text:s/>• Python<text:tab/>1</text:a></text:p>
          <text:p text:style-name="P1"><text:a xlink:type="simple" xlink:href="#__RefHeading___Toc5703_2625077907" text:style-name="Index_20_Link" text:visited-style-name="Index_20_Link"><text:s/>• NLTK<text:tab/>1</text:a></text:p>
          <text:p text:style-name="P1"><text:a xlink:type="simple" xlink:href="#__RefHeading___Toc5705_2625077907" text:style-name="Index_20_Link" text:visited-style-name="Index_20_Link"><text:s/>• Scikit-learn<text:tab/>1</text:a></text:p>
          <text:p text:style-name="P1"><text:a xlink:type="simple" xlink:href="#__RefHeading___Toc5707_2625077907" text:style-name="Index_20_Link" text:visited-style-name="Index_20_Link"><text:s/>• Google Colab<text:tab/>1</text:a></text:p>
          <text:p text:style-name="P1"><text:a xlink:type="simple" xlink:href="#__RefHeading___Toc5709_2625077907" text:style-name="Index_20_Link" text:visited-style-name="Index_20_Link"><text:s/>• Jupyter Notebook<text:tab/>2</text:a></text:p>
          <text:p text:style-name="P2"><text:a xlink:type="simple" xlink:href="#__RefHeading___Toc5711_2625077907" text:style-name="Index_20_Link" text:visited-style-name="Index_20_Link">GitHub Link<text:tab/>2</text:a></text:p>
          <text:p text:style-name="P1"><text:a xlink:type="simple" xlink:href="#__RefHeading___Toc5713_2625077907" text:style-name="Index_20_Link" text:visited-style-name="Index_20_Link">Week 1: Introduction to NLP and Applications<text:tab/>4</text:a></text:p>
          <text:p text:style-name="P2"><text:a xlink:type="simple" xlink:href="#__RefHeading___Toc6850_2625077907" text:style-name="Index_20_Link" text:visited-style-name="Index_20_Link">Title : Introduction to NLP Concepts and Text Processing<text:tab/>4</text:a></text:p>
          <text:p text:style-name="P3"><text:a xlink:type="simple" xlink:href="#__RefHeading___Toc5719_2625077907" text:style-name="Index_20_Link" text:visited-style-name="Index_20_Link">Fig 1: Python Installation<text:tab/>4</text:a></text:p>
          <text:p text:style-name="P3"><text:a xlink:type="simple" xlink:href="#__RefHeading___Toc5721_2625077907" text:style-name="Index_20_Link" text:visited-style-name="Index_20_Link">Fig 2: Jupyter Notebook or Google Colab Setup<text:tab/>4</text:a></text:p>
          <text:p text:style-name="P3"><text:a xlink:type="simple" xlink:href="#__RefHeading___Toc5723_2625077907" text:style-name="Index_20_Link" text:visited-style-name="Index_20_Link">Fig 3: NLTK Installation<text:tab/>5</text:a></text:p>
          <text:p text:style-name="P3"><text:a xlink:type="simple" xlink:href="#__RefHeading___Toc5725_2625077907" text:style-name="Index_20_Link" text:visited-style-name="Index_20_Link">Fig 4: Tokenization Output<text:tab/>5</text:a></text:p>
          <text:p text:style-name="P3"><text:a xlink:type="simple" xlink:href="#__RefHeading___Toc5727_2625077907" text:style-name="Index_20_Link" text:visited-style-name="Index_20_Link">Fig 5: Stopwords Removal Output<text:tab/>6</text:a></text:p>
          <text:p text:style-name="P3"><text:a xlink:type="simple" xlink:href="#__RefHeading___Toc5729_2625077907" text:style-name="Index_20_Link" text:visited-style-name="Index_20_Link">Fig 6: NLP Application Research Evidence<text:tab/>6</text:a></text:p>
          <text:p text:style-name="P3"><text:a xlink:type="simple" xlink:href="#__RefHeading___Toc5731_2625077907" text:style-name="Index_20_Link" text:visited-style-name="Index_20_Link">Student Reflection<text:tab/>6</text:a></text:p>
          <text:p text:style-name="P1"><text:a xlink:type="simple" xlink:href="#__RefHeading___Toc5733_2625077907" text:style-name="Index_20_Link" text:visited-style-name="Index_20_Link">Week 2: N-gram Models and POS Tagging<text:tab/>7</text:a></text:p>
          <text:p text:style-name="P2"><text:a xlink:type="simple" xlink:href="#__RefHeading___Toc6852_2625077907" text:style-name="Index_20_Link" text:visited-style-name="Index_20_Link">Title : Language Modeling and Sentence Structure Analysis<text:tab/>7</text:a></text:p>
          <text:p text:style-name="P3"><text:a xlink:type="simple" xlink:href="#__RefHeading___Toc5739_2625077907" text:style-name="Index_20_Link" text:visited-style-name="Index_20_Link">Fig 1: Bigram or Trigram Output<text:tab/>7</text:a></text:p>
          <text:p text:style-name="P3"><text:a xlink:type="simple" xlink:href="#__RefHeading___Toc5741_2625077907" text:style-name="Index_20_Link" text:visited-style-name="Index_20_Link">Fig 2: POS Tagging Example<text:tab/>8</text:a></text:p>
          <text:p text:style-name="P3"><text:a xlink:type="simple" xlink:href="#__RefHeading___Toc5743_2625077907" text:style-name="Index_20_Link" text:visited-style-name="Index_20_Link">Fig 3: Python Code for POS Tagging<text:tab/>9</text:a></text:p>
          <text:p text:style-name="P3"><text:a xlink:type="simple" xlink:href="#__RefHeading___Toc5745_2625077907" text:style-name="Index_20_Link" text:visited-style-name="Index_20_Link">Fig 4: Language Prediction Example<text:tab/>9</text:a></text:p>
          <text:p text:style-name="P3"><text:a xlink:type="simple" xlink:href="#__RefHeading___Toc5747_2625077907" text:style-name="Index_20_Link" text:visited-style-name="Index_20_Link">Fig 5: Sentence Analysis Output<text:tab/>10</text:a></text:p>
          <text:p text:style-name="P1"><text:a xlink:type="simple" xlink:href="#__RefHeading___Toc5751_2625077907" text:style-name="Index_20_Link" text:visited-style-name="Index_20_Link">Week 3: Hidden Markov Models and Sequence Labeling<text:tab/>10</text:a></text:p>
          <text:p text:style-name="P2"><text:a xlink:type="simple" xlink:href="#__RefHeading___Toc7433_2625077907" text:style-name="Index_20_Link" text:visited-style-name="Index_20_Link">Title : Sequence Prediction and Hidden State Analysis<text:tab/>10</text:a></text:p>
          <text:p text:style-name="P3"><text:a xlink:type="simple" xlink:href="#__RefHeading___Toc5757_2625077907" text:style-name="Index_20_Link" text:visited-style-name="Index_20_Link">Fig 1: Sequence Labeling Code<text:tab/>10</text:a></text:p>
          <text:p text:style-name="P3"><text:a xlink:type="simple" xlink:href="#__RefHeading___Toc5759_2625077907" text:style-name="Index_20_Link" text:visited-style-name="Index_20_Link">Fig 2: Hidden Markov Model Output<text:tab/>11</text:a></text:p>
          <text:p text:style-name="P3"><text:a xlink:type="simple" xlink:href="#__RefHeading___Toc5761_2625077907" text:style-name="Index_20_Link" text:visited-style-name="Index_20_Link">Fig 3: Named Entity Recognition Example<text:tab/>11</text:a></text:p>
          <text:p text:style-name="P3"><text:a xlink:type="simple" xlink:href="#__RefHeading___Toc5763_2625077907" text:style-name="Index_20_Link" text:visited-style-name="Index_20_Link">Fig 4: Sentence Labeling Results<text:tab/>12</text:a></text:p>
          <text:p text:style-name="P3"><text:a xlink:type="simple" xlink:href="#__RefHeading___Toc5765_2625077907" text:style-name="Index_20_Link" text:visited-style-name="Index_20_Link">Fig 5: Dataset Used for Training or Testing<text:tab/>12</text:a></text:p>
          <text:p text:style-name="P1"><text:a xlink:type="simple" xlink:href="#__RefHeading___Toc7435_2625077907" text:style-name="Index_20_Link" text:visited-style-name="Index_20_Link">Week 4 : Sequence Prediction and Hidden State Analysis<text:tab/>13</text:a></text:p>
          <text:p text:style-name="P3"><text:a xlink:type="simple" xlink:href="#__RefHeading___Toc7437_2625077907" text:style-name="Index_20_Link" text:visited-style-name="Index_20_Link">Fig 1. Install spaCy and Language Models<text:tab/>13</text:a></text:p>
          <text:p text:style-name="P3"><text:a xlink:type="simple" xlink:href="#__RefHeading___Toc7439_2625077907" text:style-name="Index_20_Link" text:visited-style-name="Index_20_Link">Fig 2. Dependency Structure Analysis<text:tab/>13</text:a></text:p>
          <text:p text:style-name="P3"><text:a xlink:type="simple" xlink:href="#__RefHeading___Toc7441_2625077907" text:style-name="Index_20_Link" text:visited-style-name="Index_20_Link">Fig 3. Semantic Similarity Comparison<text:tab/>14</text:a></text:p>
          <text:p text:style-name="P1"><text:a xlink:type="simple" xlink:href="#__RefHeading___Toc7443_2625077907" text:style-name="Index_20_Link" text:visited-style-name="Index_20_Link">Week 5 Mini Project: Student Academic Assistant Chatbot<text:tab/>15</text:a></text:p>
          <text:p text:style-name="P2"><text:a xlink:type="simple" xlink:href="#__RefHeading___Toc7445_2625077907" text:style-name="Index_20_Link" text:visited-style-name="Index_20_Link">Fig1. Python Source Code<text:tab/>15</text:a></text:p>
          <text:p text:style-name="P3"><text:a xlink:type="simple" xlink:href="#__RefHeading___Toc7447_2625077907" text:style-name="Index_20_Link" text:visited-style-name="Index_20_Link">Fig 2. Chatbot Interaction Output<text:tab/>15</text:a></text:p>
        </text:index-body>
      </text:table-of-content>
      <text:p text:style-name="P10" loext:marker-style-name="T11"><text:span text:style-name="T2"/></text:p>
      <text:h text:style-name="Heading_20_1" text:outline-level="1"><text:bookmark-start text:name="__RefHeading___Toc5713_2625077907"/><text:soft-page-break/>Week 1: Introduction to NLP and Applications<text:bookmark-end text:name="__RefHeading___Toc5713_2625077907"/></text:h>
      <text:h text:style-name="Heading_20_2" text:outline-level="2"><text:bookmark-start text:name="__RefHeading___Toc6850_2625077907"/>Title <text:s/>: Introduction to NLP Concepts and Text Processing<text:bookmark-end text:name="__RefHeading___Toc6850_2625077907"/></text:h>
      <text:h text:style-name="Heading_20_3" text:outline-level="3"><text:bookmark-start text:name="__RefHeading___Toc5719_2625077907"/>Fig 1: Python Installation<text:bookmark-end text:name="__RefHeading___Toc5719_2625077907"/></text:h>
      <text:p text:style-name="P12" loext:marker-style-name="T11"><draw:frame draw:style-name="fr2" draw:name="Image1" text:anchor-type="char" svg:width="6.6929in" svg:height="2.1236in" draw:z-index="0"><draw:image xlink:href="Pictures/1000000000000286000000CD79E024E7.png" xlink:type="simple" xlink:show="embed" xlink:actuate="onLoad" draw:mime-type="image/png"/></draw:frame><text:span text:style-name="T11"/></text:p>
      <text:h text:style-name="Heading_20_3" text:outline-level="3"><text:bookmark-start text:name="__RefHeading___Toc5721_2625077907"/>Fig 2: Jupyter Notebook or Google Colab Setup<text:bookmark-end text:name="__RefHeading___Toc5721_2625077907"/></text:h>
      <text:h text:style-name="P8" text:outline-level="2" loext:marker-style-name="T4"><draw:frame draw:style-name="fr1" draw:name="Image2" text:anchor-type="char" svg:width="6.6929in" svg:height="1.961in" draw:z-index="1"><draw:image xlink:href="Pictures/10000000000004F90000017522093365.png" xlink:type="simple" xlink:show="embed" xlink:actuate="onLoad" draw:mime-type="image/png"/></draw:frame></text:h>
      <text:h text:style-name="Heading_20_3" text:outline-level="3" text:is-list-header="true"><text:bookmark-start text:name="__RefHeading___Toc5723_2625077907"/><text:soft-page-break/>Fig 3: NLTK Installation<text:line-break/><draw:frame draw:style-name="fr3" draw:name="Image3" text:anchor-type="char" svg:x="0.0638in" svg:y="0.3528in" svg:width="6.6929in" svg:height="3.9118in" draw:z-index="2"><draw:image xlink:href="Pictures/1000000000000348000001EBE4B12982.png" xlink:type="simple" xlink:show="embed" xlink:actuate="onLoad" draw:mime-type="image/png"/></draw:frame><text:bookmark-end text:name="__RefHeading___Toc5723_2625077907"/></text:h>
      <text:h text:style-name="Heading_20_3" text:outline-level="3"><text:bookmark-start text:name="__RefHeading___Toc5725_2625077907"/>Fig 4: Tokenization Output<text:bookmark-end text:name="__RefHeading___Toc5725_2625077907"/></text:h>
      <text:p text:style-name="Text_20_body"><draw:frame draw:style-name="fr1" draw:name="Image5" text:anchor-type="char" svg:width="6.6929in" svg:height="3.2866in" draw:z-index="4"><draw:image xlink:href="Pictures/10000000000003F2000001F0FF3D44E5.png" xlink:type="simple" xlink:show="embed" xlink:actuate="onLoad" draw:mime-type="image/png"/></draw:frame></text:p>
      <text:h text:style-name="Heading_20_3" text:outline-level="3"><text:bookmark-start text:name="__RefHeading___Toc5727_2625077907"/><text:soft-page-break/>Fig 5: Stopwords Removal Output<text:bookmark-end text:name="__RefHeading___Toc5727_2625077907"/></text:h>
      <text:p text:style-name="Text_20_body"><draw:frame draw:style-name="fr1" draw:name="Image6" text:anchor-type="char" svg:width="6.6929in" svg:height="3.6917in" draw:z-index="5"><draw:image xlink:href="Pictures/10000000000003DC00000221C3774D4B.png" xlink:type="simple" xlink:show="embed" xlink:actuate="onLoad" draw:mime-type="image/png"/></draw:frame></text:p>
      <text:h text:style-name="Heading_20_3" text:outline-level="3"><text:bookmark-start text:name="__RefHeading___Toc5729_2625077907"/>Fig 6: NLP Application Research Evidence<text:bookmark-end text:name="__RefHeading___Toc5729_2625077907"/></text:h>
      <text:p text:style-name="Text_20_body"/>
      <text:p text:style-name="P17" loext:marker-style-name="T11"><draw:frame draw:style-name="fr1" draw:name="Image7" text:anchor-type="char" svg:width="6.6929in" svg:height="2.1992in" draw:z-index="6"><draw:image xlink:href="Pictures/1000000000000317000001045E852A15.png" xlink:type="simple" xlink:show="embed" xlink:actuate="onLoad" draw:mime-type="image/png"/></draw:frame><text:span text:style-name="T11"/></text:p>
      <text:p text:style-name="P23" loext:marker-style-name="T11"/>
      <text:h text:style-name="Heading_20_3" text:outline-level="3"><text:bookmark-start text:name="__RefHeading___Toc5731_2625077907"/>Student Reflection<text:bookmark-end text:name="__RefHeading___Toc5731_2625077907"/></text:h>
      <text:list text:style-name="WWNum8">
        <text:list-header>
          <text:p text:style-name="P13" loext:marker-style-name="T11"><text:span text:style-name="T11"/></text:p>
        </text:list-header>
      </text:list>
      <text:p text:style-name="P18" loext:marker-style-name="T11"><text:span text:style-name="Strong_20_Emphasis"><text:span text:style-name="T11">What </text:span></text:span><text:span text:style-name="Strong_20_Emphasis"><text:span text:style-name="T12">was </text:span></text:span><text:span text:style-name="Strong_20_Emphasis"><text:span text:style-name="T11">learned</text:span></text:span></text:p>
      <text:list text:style-name="L1">
        <text:list-item>
          <text:p text:style-name="P25">How to set up a Python NLP development environment (Jupyter/Colab, NLTK)</text:p>
        </text:list-item>
        <text:list-item>
          <text:p text:style-name="P24">Core text preprocessing techniques: tokenization and stopwords removal</text:p>
        </text:list-item>
      </text:list>
      <text:p text:style-name="Text_20_body"><text:span text:style-name="Strong_20_Emphasis">NLP applications explored</text:span></text:p>
      <text:list text:style-name="L2">
        <text:list-item>
          <text:p text:style-name="P26">ChatGPT, Google Translate, Siri, Alexa, Spam Filtering</text:p>
        </text:list-item>
      </text:list>
      <text:p text:style-name="Text_20_body"><text:soft-page-break/><text:span text:style-name="Strong_20_Emphasis">Technologies used</text:span></text:p>
      <text:list text:style-name="L3">
        <text:list-item>
          <text:p text:style-name="P27">Python, Jupyter Notebook / Google Colab, NLTK library</text:p>
        </text:list-item>
      </text:list>
      <text:p text:style-name="P18" loext:marker-style-name="T11"><text:span text:style-name="T11"/></text:p>
      <text:p text:style-name="P23" loext:marker-style-name="T11"/>
      <text:h text:style-name="Heading_20_1" text:outline-level="1" text:is-list-header="true"><text:bookmark-start text:name="__RefHeading___Toc5733_2625077907"/>Week 2: N-gram Models and POS Tagging<text:bookmark-end text:name="__RefHeading___Toc5733_2625077907"/></text:h>
      <text:h text:style-name="Heading_20_2" text:outline-level="2"><text:bookmark-start text:name="__RefHeading___Toc6852_2625077907"/>Title : Language Modeling and Sentence Structure Analysis<text:bookmark-end text:name="__RefHeading___Toc6852_2625077907"/></text:h>
      <text:h text:style-name="Heading_20_3" text:outline-level="3" text:is-list-header="true"><text:bookmark-start text:name="__RefHeading___Toc5739_2625077907"/>Fig 1: Bigram or Trigram Output<text:bookmark-end text:name="__RefHeading___Toc5739_2625077907"/></text:h>
      <text:p text:style-name="Text_20_body"><draw:frame draw:style-name="fr1" draw:name="Image8" text:anchor-type="char" svg:width="6.6929in" svg:height="6.3102in" draw:z-index="7"><draw:image xlink:href="Pictures/10000000000002DF000002B5C9FECB1A.png" xlink:type="simple" xlink:show="embed" xlink:actuate="onLoad" draw:mime-type="image/png"/></draw:frame></text:p>
      <text:h text:style-name="Heading_20_3" text:outline-level="3"><text:bookmark-start text:name="__RefHeading___Toc5741_2625077907"/><text:soft-page-break/>Fig 2: POS Tagging Example<text:bookmark-end text:name="__RefHeading___Toc5741_2625077907"/></text:h>
      <text:p text:style-name="Text_20_body"><draw:frame draw:style-name="fr4" draw:name="Image9" text:anchor-type="char" svg:width="6.5417in" svg:height="7.1354in" draw:z-index="8"><draw:image xlink:href="Pictures/1000000000000274000002AD2180E61D.png" xlink:type="simple" xlink:show="embed" xlink:actuate="onLoad" draw:mime-type="image/png"/></draw:frame></text:p>
      <text:h text:style-name="Heading_20_3" text:outline-level="3"><text:bookmark-start text:name="__RefHeading___Toc5743_2625077907"/><text:soft-page-break/>Fig 3: Python Code for POS Tagging<text:bookmark-end text:name="__RefHeading___Toc5743_2625077907"/></text:h>
      <text:p text:style-name="Text_20_body"><draw:frame draw:style-name="fr1" draw:name="Image10" text:anchor-type="char" svg:width="6.6929in" svg:height="3.8252in" draw:z-index="9"><draw:image xlink:href="Pictures/10000000000003D900000233A4EFC0A4.png" xlink:type="simple" xlink:show="embed" xlink:actuate="onLoad" draw:mime-type="image/png"/></draw:frame></text:p>
      <text:h text:style-name="Heading_20_3" text:outline-level="3"><text:bookmark-start text:name="__RefHeading___Toc5745_2625077907"/>Fig 4: Language Prediction Example<text:bookmark-end text:name="__RefHeading___Toc5745_2625077907"/></text:h>
      <text:p text:style-name="Text_20_body"><draw:frame draw:style-name="fr2" draw:name="Image11" text:anchor-type="char" svg:width="6.6929in" svg:height="3.9339in" draw:z-index="10"><draw:image xlink:href="Pictures/10000000000003A6000002253D22021E.png" xlink:type="simple" xlink:show="embed" xlink:actuate="onLoad" draw:mime-type="image/png"/></draw:frame></text:p>
      <text:h text:style-name="Heading_20_3" text:outline-level="3"><text:bookmark-start text:name="__RefHeading___Toc5747_2625077907"/><text:soft-page-break/>Fig 5: Sentence Analysis Output<text:bookmark-end text:name="__RefHeading___Toc5747_2625077907"/></text:h>
      <text:p text:style-name="Text_20_body"><draw:frame draw:style-name="fr1" draw:name="Image12" text:anchor-type="char" svg:width="6.6929in" svg:height="3.372in" draw:z-index="11"><draw:image xlink:href="Pictures/10000000000004930000024E80073222.png" xlink:type="simple" xlink:show="embed" xlink:actuate="onLoad" draw:mime-type="image/png"/></draw:frame></text:p>
      <text:h text:style-name="Heading_20_3" text:outline-level="3"/>
      <text:h text:style-name="Heading_20_1" text:outline-level="1"><text:bookmark-start text:name="__RefHeading___Toc5751_2625077907"/>Week 3: Hidden Markov Models and Sequence Labeling<text:bookmark-end text:name="__RefHeading___Toc5751_2625077907"/></text:h>
      <text:h text:style-name="Heading_20_2" text:outline-level="2"><text:bookmark-start text:name="__RefHeading___Toc7433_2625077907"/>Title : Sequence Prediction and Hidden State Analysis<text:bookmark-end text:name="__RefHeading___Toc7433_2625077907"/></text:h>
      <text:h text:style-name="Heading_20_3" text:outline-level="3"><text:bookmark-start text:name="__RefHeading___Toc5757_2625077907"/>Fig 1: Sequence Labeling Code<text:bookmark-end text:name="__RefHeading___Toc5757_2625077907"/></text:h>
      <text:p text:style-name="Text_20_body"><draw:frame draw:style-name="fr1" draw:name="Image13" text:anchor-type="char" svg:width="6.6929in" svg:height="3.3984in" draw:z-index="12"><draw:image xlink:href="Pictures/1000000000000402000002098A3E337F.png" xlink:type="simple" xlink:show="embed" xlink:actuate="onLoad" draw:mime-type="image/png"/></draw:frame></text:p>
      <text:h text:style-name="Heading_20_3" text:outline-level="3"><text:bookmark-start text:name="__RefHeading___Toc5759_2625077907"/><text:soft-page-break/>Fig 2: Hidden Markov Model Output<text:bookmark-end text:name="__RefHeading___Toc5759_2625077907"/></text:h>
      <text:p text:style-name="Text_20_body"><draw:frame draw:style-name="fr2" draw:name="Image14" text:anchor-type="char" svg:width="6.6929in" svg:height="4.0244in" draw:z-index="13"><draw:image xlink:href="Pictures/100000000000030C000001D5E7F2DD6B.png" xlink:type="simple" xlink:show="embed" xlink:actuate="onLoad" draw:mime-type="image/png"/></draw:frame></text:p>
      <text:h text:style-name="Heading_20_3" text:outline-level="3"><text:bookmark-start text:name="__RefHeading___Toc5761_2625077907"/>Fig 3: Named Entity Recognition Example<text:bookmark-end text:name="__RefHeading___Toc5761_2625077907"/></text:h>
      <text:p text:style-name="Text_20_body"><draw:frame draw:style-name="fr2" draw:name="Image15" text:anchor-type="char" svg:width="6.6929in" svg:height="4.202in" draw:z-index="14"><draw:image xlink:href="Pictures/1000000000000387000002379E3810AB.png" xlink:type="simple" xlink:show="embed" xlink:actuate="onLoad" draw:mime-type="image/png"/></draw:frame></text:p>
      <text:h text:style-name="Heading_20_3" text:outline-level="3"><text:bookmark-start text:name="__RefHeading___Toc5763_2625077907"/><text:soft-page-break/>Fig 4: Sentence Labeling Results<text:bookmark-end text:name="__RefHeading___Toc5763_2625077907"/></text:h>
      <text:p text:style-name="Text_20_body"><draw:frame draw:style-name="fr2" draw:name="Image16" text:anchor-type="char" svg:width="6.6929in" svg:height="3.2571in" draw:z-index="15"><draw:image xlink:href="Pictures/1000000000000384000001B614B39AD8.png" xlink:type="simple" xlink:show="embed" xlink:actuate="onLoad" draw:mime-type="image/png"/></draw:frame></text:p>
      <text:h text:style-name="Heading_20_3" text:outline-level="3"><text:bookmark-start text:name="__RefHeading___Toc5765_2625077907"/>Fig 5: Dataset Used for Training or Testing<text:bookmark-end text:name="__RefHeading___Toc5765_2625077907"/></text:h>
      <text:p text:style-name="Text_20_body"><draw:frame draw:style-name="fr2" draw:name="Image17" text:anchor-type="char" svg:width="6.6929in" svg:height="4.3283in" draw:z-index="16"><draw:image xlink:href="Pictures/10000000000003460000021EB1C7F3E8.png" xlink:type="simple" xlink:show="embed" xlink:actuate="onLoad" draw:mime-type="image/png"/></draw:frame></text:p>
      <text:p text:style-name="P23" loext:marker-style-name="T11"/>
      <text:h text:style-name="Heading_20_1" text:outline-level="1"><text:bookmark-start text:name="__RefHeading___Toc7435_2625077907"/><text:soft-page-break/>Week 4 : Sequence Prediction and Hidden State Analysis<text:bookmark-end text:name="__RefHeading___Toc7435_2625077907"/></text:h>
      <text:h text:style-name="Heading_20_3" text:outline-level="3"><text:bookmark-start text:name="__RefHeading___Toc7437_2625077907"/><text:span text:style-name="T21">Fig 1. </text:span>Install spaCy and Language Models<text:line-break/><draw:frame draw:style-name="fr3" draw:name="Image18" text:anchor-type="char" svg:x="0.0075in" svg:y="0.539in" svg:width="6.6929in" svg:height="3.8882in" draw:z-index="17"><draw:image xlink:href="Pictures/1000000000000335000001DDAFBBB7F6.png" xlink:type="simple" xlink:show="embed" xlink:actuate="onLoad" draw:mime-type="image/png"/></draw:frame><text:bookmark-end text:name="__RefHeading___Toc7437_2625077907"/></text:h>
      <text:h text:style-name="Heading_20_3" text:outline-level="3"><text:bookmark-start text:name="__RefHeading___Toc7439_2625077907"/><text:span text:style-name="T21">F</text:span><draw:frame draw:style-name="fr3" draw:name="Image19" text:anchor-type="char" svg:x="0.0638in" svg:y="4.7252in" svg:width="6.6929in" svg:height="4.8783in" draw:z-index="18"><draw:image xlink:href="Pictures/100000000000030E0000023AF1645DAF.png" xlink:type="simple" xlink:show="embed" xlink:actuate="onLoad" draw:mime-type="image/png"/></draw:frame><text:span text:style-name="T21">ig 2. </text:span>Dependency Structure Analysis<text:bookmark-end text:name="__RefHeading___Toc7439_2625077907"/></text:h>
      <text:p text:style-name="Text_20_body"/>
      <text:h text:style-name="Heading_20_3" text:outline-level="3"><text:bookmark-start text:name="__RefHeading___Toc7441_2625077907"/><text:soft-page-break/><text:span text:style-name="T21">Fig 3. </text:span><text:span text:style-name="T20">Semantic Similarity Comparison</text:span><text:bookmark-end text:name="__RefHeading___Toc7441_2625077907"/></text:h>
      <text:p text:style-name="Text_20_body"><draw:frame draw:style-name="fr2" draw:name="Image20" text:anchor-type="char" svg:width="6.6929in" svg:height="4.8528in" draw:z-index="19"><draw:image xlink:href="Pictures/100000000000032400000247C2D0DEE5.png" xlink:type="simple" xlink:show="embed" xlink:actuate="onLoad" draw:mime-type="image/png"/></draw:frame><text:span text:style-name="T20"/></text:p>
      <text:h text:style-name="Heading_20_1" text:outline-level="1"><text:bookmark-start text:name="__RefHeading___Toc7443_2625077907"/>Week 5 Mini Project: Student Academic Assistant Chatbot<text:bookmark-end text:name="__RefHeading___Toc7443_2625077907"/></text:h>
      <text:h text:style-name="Heading_20_2" text:outline-level="2"><text:bookmark-start text:name="__RefHeading___Toc7445_2625077907"/><text:soft-page-break/><text:span text:style-name="T29">Fig1. </text:span>Python Source Code<text:bookmark-end text:name="__RefHeading___Toc7445_2625077907"/></text:h>
      <text:h text:style-name="Heading_20_2" text:outline-level="2"><draw:frame draw:style-name="fr1" draw:name="Image21" text:anchor-type="char" svg:width="6.6929in" svg:height="4.4693in" draw:z-index="20"><draw:image xlink:href="Pictures/100000000000034B00000233FB3C08B6.png" xlink:type="simple" xlink:show="embed" xlink:actuate="onLoad" draw:mime-type="image/png"/></draw:frame></text:h>
      <text:h text:style-name="Heading_20_3" text:outline-level="3"><text:bookmark-start text:name="__RefHeading___Toc7447_2625077907"/>Fig 2. Chatbot Interaction Output<text:bookmark-end text:name="__RefHeading___Toc7447_2625077907"/></text:h>
      <text:p text:style-name="Text_20_body"><draw:frame draw:style-name="fr1" draw:name="Image22" text:anchor-type="char" svg:width="6.6929in" svg:height="2.3181in" draw:z-index="21"><draw:image xlink:href="Pictures/100000000000034B00000124F4C2BF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1:45:39.474814715</meta:creation-date>
    <dc:date>2026-06-05T18:34:01.928183709</dc:date>
    <meta:editing-duration>PT3H33M10S</meta:editing-duration>
    <meta:editing-cycles>1</meta:editing-cycles>
    <meta:document-statistic meta:table-count="0" meta:image-count="22" meta:object-count="0" meta:page-count="14" meta:paragraph-count="94" meta:word-count="543" meta:character-count="3313" meta:non-whitespace-character-count="2857"/>
    <meta:generator>LibreOffice/24.2.7.2$Linux_X86_64 LibreOffice_project/420$Build-2</meta:generator>
  </office:meta>
</office:document-meta>
</file>